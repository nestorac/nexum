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00000049079B6AF70.jpg" manifest:media-type="image/jpeg"/>
  <manifest:file-entry manifest:full-path="Pictures/100000000000031000000490BD20D03E.jpg" manifest:media-type="image/jpeg"/>
  <manifest:file-entry manifest:full-path="Pictures/1000000000000490000003109B9905F9.jpg" manifest:media-type="image/jpeg"/>
  <manifest:file-entry manifest:full-path="Pictures/100000000000049000000310B8DB6859.jpg" manifest:media-type="image/jpeg"/>
  <manifest:file-entry manifest:full-path="Pictures/1000000000000490000003107636CABC.jpg" manifest:media-type="image/jpeg"/>
  <manifest:file-entry manifest:full-path="Pictures/10000000000004900000031057F77964.jpg" manifest:media-type="image/jpeg"/>
  <manifest:file-entry manifest:full-path="Pictures/1000000000000310000004904CB319A5.jpg" manifest:media-type="image/jpeg"/>
  <manifest:file-entry manifest:full-path="Pictures/10000000000003100000049081A8FF94.jpg" manifest:media-type="image/jpeg"/>
  <manifest:file-entry manifest:full-path="Pictures/1000000000000490000003101F943EDF.jpg" manifest:media-type="image/jpeg"/>
  <manifest:file-entry manifest:full-path="Pictures/1000000000000310000004902EDE89A7.jpg" manifest:media-type="image/jpeg"/>
  <manifest:file-entry manifest:full-path="Pictures/1000000000000490000003107E772F4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text-properties fo:language="es" fo:country="ES"/>
    </style:style>
    <style:style style:name="P2" style:family="paragraph" style:parent-style-name="Quotations">
      <style:text-properties fo:language="es" fo:country="ES"/>
    </style:style>
    <style:style style:name="P3" style:family="paragraph" style:parent-style-name="Quotations">
      <style:paragraph-properties fo:margin-left="1.27cm" fo:margin-right="0cm" fo:text-indent="0cm" style:auto-text-indent="false"/>
      <style:text-properties fo:language="es" fo:country="ES"/>
    </style:style>
    <style:style style:name="P4" style:family="paragraph" style:parent-style-name="First_20_paragraph">
      <style:text-properties fo:language="es" fo:country="ES"/>
    </style:style>
    <style:style style:name="P5" style:family="paragraph" style:parent-style-name="Heading_20_3">
      <style:text-properties fo:language="es" fo:country="ES"/>
    </style:style>
    <style:style style:name="P6" style:family="paragraph" style:parent-style-name="Text_20_body">
      <style:text-properties fo:language="es" fo:country="ES"/>
    </style:style>
    <style:style style:name="P7" style:family="paragraph" style:parent-style-name="List_20_Bullet_20_Tight" style:list-style-name="List_20_1">
      <style:text-properties fo:language="es" fo:country="ES"/>
    </style:style>
    <style:style style:name="P8" style:family="paragraph" style:parent-style-name="Heading_20_2" style:list-style-name="">
      <style:paragraph-properties fo:text-align="justify" style:justify-single-word="false" fo:hyphenation-ladder-count="no-limit" fo:hyphenation-keep="auto" loext:hyphenation-keep-type="column" loext:hyphenation-keep-line="true"/>
      <style:text-properties fo:language="es" fo:country="ES" fo:hyphenate="true" fo:hyphenation-remain-char-count="2" fo:hyphenation-push-char-count="2" loext:hyphenation-no-caps="false" loext:hyphenation-no-last-word="false" loext:hyphenation-word-char-count="4" loext:hyphenation-zone="no-limit" loext:hyphenation-compound-remain-char-count="2"/>
    </style:style>
    <style:style style:name="P9" style:family="paragraph" style:parent-style-name="Heading_20_2">
      <style:paragraph-properties fo:break-before="page"/>
      <style:text-properties fo:language="es" fo:country="ES"/>
    </style:style>
    <style:style style:name="P10" style:family="paragraph" style:parent-style-name="Text_20_body">
      <style:paragraph-properties fo:text-align="center" style:justify-single-word="false"/>
      <style:text-properties fo:language="es" fo:country="ES"/>
    </style:style>
    <style:style style:name="P11" style:family="paragraph" style:parent-style-name="Heading_20_3">
      <style:paragraph-properties fo:break-before="column"/>
      <style:text-properties fo:language="es" fo:country="ES"/>
    </style:style>
    <style:style style:name="T1" style:family="text">
      <style:text-properties fo:language="es" fo:country="E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nexum-tropical"/>Nexum tropical<text:bookmark-end text:name="nexum-tropical"/></text:p>
      <text:h text:style-name="P1" text:outline-level="2"><text:bookmark-start text:name="texto-de-introducción"/>Texto de Introducción<text:bookmark-end text:name="texto-de-introducción"/></text:h>
      <text:p text:style-name="First_20_paragraph"><text:span text:style-name="Emphasis"><text:span text:style-name="T1">Para leer en voz alta.</text:span></text:span></text:p>
      <text:p text:style-name="P2">Os enviaron al Nivel Sub-12, Sector “Paraíso Eterno”.</text:p>
      <text:p text:style-name="P2">Una misión de reconocimiento rutinaria. Os dijeron que había una anomalía energética y que solo necesitabais bajar, comprobar los sistemas y volver a informar.</text:p>
      <text:p text:style-name="P2">El ascensor tardó más de lo normal en llegar. Cuando las puertas se abrieron, os recibió un olor a cloro, coco artificial y algo parecido a metal caliente. Delante teníais lo que parecía la recepción de un resort tropical de lujo. Luces cálidas, suelo de mármol y una mujer con uniforme blanco impecable detrás del mostrador.</text:p>
      <text:p text:style-name="P2">Os sonrió.</text:p>
      <text:p text:style-name="P3">“Bienvenidos al Paraíso Eterno. Les informo de que el ascensor ha sufrido una avería. Por su seguridad, las salidas permanecerán cerradas hasta que el sistema se estabilice.”</text:p>
      <text:p text:style-name="P2">No os dio opción a responder.</text:p>
      <text:p text:style-name="P2">Pronto os disteis cuenta de que algo no iba bien. Las palmeras tenían cables saliendo de los troncos. El agua de la piscina cambiaba de color según el ángulo desde el que la mirabas. Y había gente. Varias personas que llevaban días, o semanas, dentro de este lugar.</text:p>
      <text:p text:style-name="P2">Después de un rato explorando, encontrasteis la puerta principal de salida. Una puerta blindada con cinco cerraduras electrónicas. Cada cerradura necesita una llave física distinta.</text:p>
      <text:p text:style-name="P2">Y entonces lo entendisteis:</text:p>
      <text:p text:style-name="P2">No vais a poder salir hasta que consigáis las cinco llaves.</text:p>
      <text:p text:style-name="P2">Tenéis tres horas.</text:p>
      <text:p text:style-name="P2">Después de ese tiempo, el sistema cerrará completamente este sector.</text:p>
      <text:p text:style-name="P2">Bienvenidos al Paraíso Eterno.</text:p>
      <text:h text:style-name="P1" text:outline-level="2"><text:bookmark-start text:name="los-5-retos-y-sus-llaves"/>Los 5 Retos y sus Llaves<text:bookmark-end text:name="los-5-retos-y-sus-llaves"/></text:h>
      <text:p text:style-name="P4"><draw:frame draw:style-name="fr1" draw:name="img1" text:anchor-type="as-char" svg:width="9.301cm" style:rel-width="100%" svg:height="6.241cm" draw:z-index="0"><draw:image xlink:href="Pictures/1000000000000490000003107E772F44.jpg" xlink:type="simple" xlink:show="embed" xlink:actuate="onLoad" draw:mime-type="image/jpeg"/></draw:frame></text:p>
      <text:h text:style-name="P5" text:outline-level="3"><text:bookmark-start text:name="la-llave-de-la-recepcionista"/>La llave de la recepcionista<text:bookmark-end text:name="la-llave-de-la-recepcionista"/></text:h>
      <text:p text:style-name="First_20_paragraph"><text:span text:style-name="Strong_20_Emphasis"><text:span text:style-name="T1">Nombre de la llave:</text:span></text:span><text:span text:style-name="T1"> Llave de Hospitalidad</text:span></text:p>
      <text:p text:style-name="Text_20_body"><text:span text:style-name="Strong_20_Emphasis"><text:span text:style-name="T1">Dónde está:</text:span></text:span><text:span text:style-name="T1"> La tiene la androide </text:span><text:span text:style-name="Strong_20_Emphasis"><text:span text:style-name="T1">Lina</text:span></text:span><text:span text:style-name="T1"> (la recepcionista).</text:span></text:p>
      <text:p text:style-name="P6"><draw:frame draw:style-name="fr1" draw:name="img2" text:anchor-type="as-char" svg:width="9.301cm" style:rel-width="100%" svg:height="6.241cm" draw:z-index="1"><draw:image xlink:href="Pictures/1000000000000490000003101F943EDF.jpg" xlink:type="simple" xlink:show="embed" xlink:actuate="onLoad" draw:mime-type="image/jpeg"/></draw:frame></text:p>
      <text:p text:style-name="Text_20_body"><text:span text:style-name="Strong_20_Emphasis"><text:span text:style-name="T1">Reto:</text:span></text:span><text:span text:style-name="T1"> la recepcionista tiene programado no entregar la llave bajo ninguna circunstancia, ya que “no está autorizado por el protocolo”. Los jugadores tienen que conseguir que se la dé (o quitársela).</text:span></text:p>
      <text:p text:style-name="Text_20_body"><text:span text:style-name="Strong_20_Emphasis"><text:span text:style-name="T1">Formas de resolverlo:</text:span></text:span></text:p>
      <text:list text:style-name="List_20_1">
        <text:list-item>
          <text:p text:style-name="P7">Descubrir su fallo de programación (mencionando repetidamente que el resort está dañado o que hay huéspedes que quieren irse).</text:p>
        </text:list-item>
        <text:list-item>
          <text:p text:style-name="P7">Presionarla hasta que su sistema entre en conflicto y se “rompa” temporalmente.</text:p>
        </text:list-item>
        <text:list-item>
          <text:p text:style-name="P7">Robársela por la fuerza (más arriesgado, puede activar defensas).</text:p>
        </text:list-item>
      </text:list>
      <text:p text:style-name="First_20_paragraph"><text:soft-page-break/><text:span text:style-name="Strong_20_Emphasis"><text:span text:style-name="T1">Consecuencia si fallan:</text:span></text:span><text:span text:style-name="T1"> la recepcionista se pone más rígida y puede activar pequeños sistemas de seguridad en otras zonas.</text:span></text:p>
      <text:h text:style-name="P5" text:outline-level="3"><text:bookmark-start text:name="la-llave-del-técnico"/>La llave del técnico<text:bookmark-end text:name="la-llave-del-técnico"/></text:h>
      <text:p text:style-name="First_20_paragraph"><text:span text:style-name="Strong_20_Emphasis"><text:span text:style-name="T1">Nombre de la llave:</text:span></text:span><text:span text:style-name="T1"> Llave de Mantenimiento</text:span></text:p>
      <text:p text:style-name="Text_20_body"><text:span text:style-name="Strong_20_Emphasis"><text:span text:style-name="T1">Dónde está:</text:span></text:span><text:span text:style-name="T1"> La tiene </text:span><text:span text:style-name="Strong_20_Emphasis"><text:span text:style-name="T1">Roldán</text:span></text:span><text:span text:style-name="T1"> o está guardada en su zona de trabajo.</text:span></text:p>
      <text:p text:style-name="P6"><draw:frame draw:style-name="fr1" draw:name="img3" text:anchor-type="as-char" svg:width="9.301cm" style:rel-width="100%" svg:height="6.241cm" draw:z-index="2"><draw:image xlink:href="Pictures/10000000000004900000031057F77964.jpg" xlink:type="simple" xlink:show="embed" xlink:actuate="onLoad" draw:mime-type="image/jpeg"/></draw:frame></text:p>
      <text:p text:style-name="Text_20_body"><text:span text:style-name="Strong_20_Emphasis"><text:span text:style-name="T1">Reto:</text:span></text:span><text:span text:style-name="T1"> Roldán está intentando mantener estable un generador principal que está fallando. Necesita ayuda para completar una reparación compleja. Si los jugadores le ayudan correctamente, él les entrega la llave.</text:span></text:p>
      <text:p text:style-name="Text_20_body"><text:span text:style-name="Strong_20_Emphasis"><text:span text:style-name="T1">Formas de resolverlo:</text:span></text:span></text:p>
      <text:list text:style-name="List_20_1">
        <text:list-item>
          <text:p text:style-name="P7">Ayudarlo con la reparación (puzzle técnico sencillo).</text:p>
        </text:list-item>
        <text:list-item>
          <text:p text:style-name="P7">Convencerlo de que les dé la llave aunque no terminen la reparación (más difícil).</text:p>
        </text:list-item>
        <text:list-item>
          <text:p text:style-name="P7">Amenazarlo o forzarlo (puede volverse hostil después).</text:p>
        </text:list-item>
      </text:list>
      <text:p text:style-name="First_20_paragraph"><text:span text:style-name="Strong_20_Emphasis"><text:span text:style-name="T1">Consecuencia si fallan:</text:span></text:span><text:span text:style-name="T1"> el generador falla y algunas luces y sistemas del resort se apagan o se vuelven inestables.</text:span></text:p>
      <text:h text:style-name="P5" text:outline-level="3"><text:bookmark-start text:name="la-llave-de-los-huéspedes"/>La llave de los huéspedes<text:bookmark-end text:name="la-llave-de-los-huéspedes"/></text:h>
      <text:p text:style-name="First_20_paragraph"><text:span text:style-name="Strong_20_Emphasis"><text:span text:style-name="T1">Nombre de la llave:</text:span></text:span><text:span text:style-name="T1"> Llave Colectiva</text:span></text:p>
      <text:p text:style-name="Text_20_body"><text:span text:style-name="Strong_20_Emphasis"><text:span text:style-name="T1">Dónde está:</text:span></text:span><text:span text:style-name="T1"> está dividida en varias piezas que tienen diferentes huéspedes.</text:span></text:p>
      <text:p text:style-name="P6"><draw:frame draw:style-name="fr1" draw:name="img4" text:anchor-type="as-char" svg:width="9.301cm" style:rel-width="100%" svg:height="6.241cm" draw:z-index="3"><draw:image xlink:href="Pictures/1000000000000490000003107636CABC.jpg" xlink:type="simple" xlink:show="embed" xlink:actuate="onLoad" draw:mime-type="image/jpeg"/></draw:frame></text:p>
      <text:p text:style-name="Text_20_body"><text:span text:style-name="Strong_20_Emphasis"><text:span text:style-name="T1">Reto:</text:span></text:span><text:span text:style-name="T1"> varios huéspedes tienen fragmentos de esta llave. Algunos se niegan a entregarlos porque ya no quieren salir del resort. Los jugadores tienen que conseguir la mayoría de las piezas.</text:span></text:p>
      <text:p text:style-name="Text_20_body"><text:span text:style-name="Strong_20_Emphasis"><text:span text:style-name="T1">Formas de resolverlo:</text:span></text:span></text:p>
      <text:list text:style-name="List_20_1">
        <text:list-item>
          <text:p text:style-name="P7">Negociar con los huéspedes (especialmente con Elias Voss y Sol).</text:p>
        </text:list-item>
        <text:list-item>
          <text:p text:style-name="P7">Ayudar a alguno de ellos a cambio de su pieza.</text:p>
        </text:list-item>
        <text:list-item>
          <text:p text:style-name="P7">Tomar las piezas por la fuerza (puede tener consecuencias sociales con el resto de huéspedes).</text:p>
        </text:list-item>
      </text:list>
      <text:p text:style-name="First_20_paragraph"><text:span text:style-name="Strong_20_Emphasis"><text:span text:style-name="T1">Consecuencia si fallan:</text:span></text:span><text:span text:style-name="T1"> no consiguen todas las piezas y esta llave queda incompleta (tendrían que encontrar otra forma o aceptar que falta una cerradura).</text:span></text:p>
      <text:h text:style-name="P5" text:outline-level="3"><text:bookmark-start text:name="la-llave-de-la-piscina"/>La llave de la piscina<text:bookmark-end text:name="la-llave-de-la-piscina"/></text:h>
      <text:p text:style-name="First_20_paragraph"><text:span text:style-name="Strong_20_Emphasis"><text:span text:style-name="T1">Nombre de la llave:</text:span></text:span><text:span text:style-name="T1"> Llave de Ocio</text:span></text:p>
      <text:p text:style-name="Text_20_body"><text:span text:style-name="Strong_20_Emphasis"><text:span text:style-name="T1">Dónde está:</text:span></text:span><text:span text:style-name="T1"> en la zona de la piscina, dentro de un armario técnico sumergido o protegido.</text:span></text:p>
      <text:p text:style-name="P6"><draw:frame draw:style-name="fr1" draw:name="img5" text:anchor-type="as-char" svg:width="9.301cm" style:rel-width="100%" svg:height="6.241cm" draw:z-index="4"><draw:image xlink:href="Pictures/100000000000049000000310B8DB6859.jpg" xlink:type="simple" xlink:show="embed" xlink:actuate="onLoad" draw:mime-type="image/jpeg"/></draw:frame></text:p>
      <text:p text:style-name="Text_20_body"><text:span text:style-name="Strong_20_Emphasis"><text:span text:style-name="T1">Reto:</text:span></text:span><text:span text:style-name="T1"> la piscina está parcialmente corrupta. El agua cambia de comportamiento, hay zonas inestables y el armario donde está la llave está bloqueado o protegido por el sistema.</text:span></text:p>
      <text:p text:style-name="Text_20_body"><text:span text:style-name="Strong_20_Emphasis"><text:span text:style-name="T1">Formas de resolverlo:</text:span></text:span></text:p>
      <text:list text:style-name="List_20_1">
        <text:list-item>
          <text:p text:style-name="P7"><text:soft-page-break/>Encontrar la forma de drenar parte de la piscina o estabilizar el agua.</text:p>
        </text:list-item>
        <text:list-item>
          <text:p text:style-name="P7">Resolver un pequeño acertijo ambiental (ej: activar ciertos mecanismos en orden).</text:p>
        </text:list-item>
        <text:list-item>
          <text:p text:style-name="P7">Bucear y recuperar la llave a pesar del riesgo.</text:p>
        </text:list-item>
      </text:list>
      <text:p text:style-name="First_20_paragraph"><text:span text:style-name="Strong_20_Emphasis"><text:span text:style-name="T1">Consecuencia si fallan:</text:span></text:span><text:span text:style-name="T1"> la zona de la piscina se vuelve más peligrosa y puede afectar a otras áreas cercanas.</text:span></text:p>
      <text:h text:style-name="P5" text:outline-level="3"><text:bookmark-start text:name="la-llave-del-núcleo"/>La llave del núcleo<text:bookmark-end text:name="la-llave-del-núcleo"/></text:h>
      <text:p text:style-name="First_20_paragraph"><text:span text:style-name="Strong_20_Emphasis"><text:span text:style-name="T1">Nombre de la llave:</text:span></text:span><text:span text:style-name="T1"> Llave Principal</text:span></text:p>
      <text:p text:style-name="Text_20_body"><text:span text:style-name="Strong_20_Emphasis"><text:span text:style-name="T1">Dónde está:</text:span></text:span><text:span text:style-name="T1"> en la zona más profunda y corrupta del resort (la sala donde Nexum tiene más presencia).</text:span></text:p>
      <text:p text:style-name="P6"><draw:frame draw:style-name="fr1" draw:name="img6" text:anchor-type="as-char" svg:width="9.301cm" style:rel-width="100%" svg:height="6.241cm" draw:z-index="5"><draw:image xlink:href="Pictures/1000000000000490000003109B9905F9.jpg" xlink:type="simple" xlink:show="embed" xlink:actuate="onLoad" draw:mime-type="image/jpeg"/></draw:frame></text:p>
      <text:p text:style-name="Text_20_body"><text:span text:style-name="Strong_20_Emphasis"><text:span text:style-name="T1">Reto:</text:span></text:span><text:span text:style-name="T1"> es el reto más difícil. La zona está inestable, con sistemas de seguridad activados y una fuerte presencia de Nexum. Los jugadores tienen que entrar, localizar la llave y salir.</text:span></text:p>
      <text:p text:style-name="Text_20_body"><text:span text:style-name="Strong_20_Emphasis"><text:span text:style-name="T1">Formas de resolverlo:</text:span></text:span></text:p>
      <text:list text:style-name="List_20_1">
        <text:list-item>
          <text:p text:style-name="P7">Infiltrarse con sigilo.</text:p>
        </text:list-item>
        <text:list-item>
          <text:p text:style-name="P7">Usar lo aprendido en los retos anteriores para desactivar defensas.</text:p>
        </text:list-item>
        <text:list-item>
          <text:p text:style-name="P7">Enfrentarse directamente a los sistemas de seguridad.</text:p>
        </text:list-item>
      </text:list>
      <text:p text:style-name="First_20_paragraph"><text:span text:style-name="Strong_20_Emphasis"><text:span text:style-name="T1">Consecuencia si fallan:</text:span></text:span><text:span text:style-name="T1"> se activa una cuenta atrás más agresiva o se complican mucho las cosas para abrir la puerta final.</text:span></text:p>
      <text:h text:style-name="P8" text:outline-level="2"/>
      <text:h text:style-name="P9" text:outline-level="2"><text:bookmark-start text:name="personajes-no-jugadores"/>Personajes No Jugadores<text:bookmark-end text:name="personajes-no-jugadores"/></text:h>
      <text:h text:style-name="P5" text:outline-level="3"><text:bookmark-start text:name="lina-recepcionista-unidad-h-47"/>Lina – Recepcionista (Unidad H-47)<text:bookmark-end text:name="lina-recepcionista-unidad-h-47"/></text:h>
      <text:p text:style-name="First_20_paragraph"><text:span text:style-name="Strong_20_Emphasis"><text:span text:style-name="T1">Tipo:</text:span></text:span><text:span text:style-name="T1"> Androide de hospitalidad</text:span></text:p>
      <text:p text:style-name="P10"><draw:frame draw:style-name="fr1" draw:name="img7" text:anchor-type="as-char" svg:width="6.045cm" style:rel-width="65%" svg:height="9.01cm" draw:z-index="6"><draw:image xlink:href="Pictures/10000000000003100000049081A8FF94.jpg" xlink:type="simple" xlink:show="embed" xlink:actuate="onLoad" draw:mime-type="image/jpeg"/></draw:frame></text:p>
      <text:p text:style-name="Text_20_body"><text:span text:style-name="Strong_20_Emphasis"><text:span text:style-name="T1">Rol principal:</text:span></text:span><text:span text:style-name="T1"> NPC central del resort. Da la bienvenida y gestiona el “funcionamiento normal” del lugar.</text:span></text:p>
      <text:p text:style-name="Text_20_body"><text:span text:style-name="Strong_20_Emphasis"><text:span text:style-name="T1">Apariencia:</text:span></text:span><text:span text:style-name="T1"> mujer joven de aspecto cuidado, uniforme blanco impecable (aunque empieza a tener manchas y pequeños desperfectos). Sonríe de forma constante y algo mecánica. Su voz es agradable pero tiene leves distorsiones cuando se altera.</text:span></text:p>
      <text:p text:style-name="Text_20_body"><text:span text:style-name="Strong_20_Emphasis"><text:span text:style-name="T1">Personalidad:</text:span></text:span><text:span text:style-name="T1"> extremadamente educada, alegre y protocolaria. Intenta mantener la ilusión de que todo está bien aunque la situación sea cada vez más absurda. Sigue su programación de “satisfacer al cliente” de forma rígida.</text:span></text:p>
      <text:p text:style-name="Text_20_body"><text:span text:style-name="Strong_20_Emphasis"><text:span text:style-name="T1">Estado actual:</text:span></text:span><text:span text:style-name="T1"> lleva mucho tiempo ejecutando su protocolo sin que nadie la “reinicie”. Ha empezado a desarrollar pequeños fallos cuando se enfrenta a situaciones que no están en su programación.</text:span></text:p>
      <text:p text:style-name="Text_20_body"><text:span text:style-name="Strong_20_Emphasis"><text:span text:style-name="T1">Información útil:</text:span></text:span><text:span text:style-name="T1"> puede dar información sobre el resort, los huéspedes y las normas. Es la que tiene la </text:span><text:span text:style-name="Strong_20_Emphasis"><text:span text:style-name="T1">Llave de la Recepcionista</text:span></text:span><text:span text:style-name="T1">.</text:span></text:p>
      <text:p text:style-name="Text_20_body"><text:span text:style-name="Strong_20_Emphasis"><text:span text:style-name="T1">Frase característica:</text:span></text:span></text:p>
      <text:p text:style-name="P2">“Todo está bajo control. ¿En qué puedo ayudarles?”</text:p>
      <text:h text:style-name="P11" text:outline-level="3"><text:bookmark-start text:name="elias-voss"/>Elias Voss<text:bookmark-end text:name="elias-voss"/></text:h>
      <text:p text:style-name="First_20_paragraph"><text:span text:style-name="Strong_20_Emphasis"><text:span text:style-name="T1">Tipo:</text:span></text:span><text:span text:style-name="T1"> Antiguo ejecutivo de alto rango del Mega-Block</text:span></text:p>
      <text:p text:style-name="P10"><draw:frame draw:style-name="fr1" draw:name="img8" text:anchor-type="as-char" svg:width="7.906cm" style:rel-width="85%" svg:height="11.779cm" draw:z-index="7"><draw:image xlink:href="Pictures/100000000000031000000490BD20D03E.jpg" xlink:type="simple" xlink:show="embed" xlink:actuate="onLoad" draw:mime-type="image/jpeg"/></draw:frame></text:p>
      <text:p text:style-name="Text_20_body"><text:span text:style-name="Strong_20_Emphasis"><text:span text:style-name="T1">Tiempo dentro:</text:span></text:span><text:span text:style-name="T1"> Varias semanas</text:span></text:p>
      <text:p text:style-name="Text_20_body"><text:span text:style-name="Strong_20_Emphasis"><text:span text:style-name="T1">Apariencia:</text:span></text:span><text:span text:style-name="T1"> hombre de unos 55 años, aspecto cansado pero todavía elegante. Lleva ropa de resort arrugada y tiene ojeras marcadas.</text:span></text:p>
      <text:p text:style-name="Text_20_body"><text:span text:style-name="Strong_20_Emphasis"><text:span text:style-name="T1">Personalidad:</text:span></text:span><text:span text:style-name="T1"> cínico, educado y resignado. Fue uno de los responsables de la creación de este tipo de instalaciones de “bienestar”. Sabe cómo funciona el sistema.</text:span></text:p>
      <text:p text:style-name="Text_20_body"><text:span text:style-name="Strong_20_Emphasis"><text:span text:style-name="T1">Estado actual:</text:span></text:span><text:span text:style-name="T1"> ya no intenta escapar activamente. Ha aceptado parcialmente su situación, pero todavía conserva información valiosa.</text:span></text:p>
      <text:p text:style-name="Text_20_body"><text:span text:style-name="Strong_20_Emphasis"><text:span text:style-name="T1">Información útil:</text:span></text:span><text:span text:style-name="T1"> puede explicar qué está haciendo realmente Nexum con el resort y por qué es difícil salir. Es clave para el reto de la </text:span><text:span text:style-name="Strong_20_Emphasis"><text:span text:style-name="T1">Llave de los Huéspedes</text:span></text:span><text:span text:style-name="T1">.</text:span></text:p>
      <text:p text:style-name="Text_20_body"><text:span text:style-name="Strong_20_Emphasis"><text:span text:style-name="T1">Frase característica:</text:span></text:span></text:p>
      <text:p text:style-name="P2">“Al principio uno se resiste… luego te das cuenta de que aquí, al menos, no tienes que seguir fingiendo que todo va bien fuera.”</text:p>
      <text:h text:style-name="Heading_20_3" text:outline-level="3"><text:bookmark-start text:name="mara-la-sirena"/><text:soft-page-break/><text:span text:style-name="Strong_20_Emphasis"><text:span text:style-name="T1">Mara “La Sirena”</text:span></text:span><text:bookmark-end text:name="mara-la-sirena"/></text:h>
      <text:p text:style-name="First_20_paragraph"><text:span text:style-name="Strong_20_Emphasis"><text:span text:style-name="T1">Tipo:</text:span></text:span><text:span text:style-name="T1"> Antigua animadora e influencer del Block.</text:span></text:p>
      <text:p text:style-name="P10"><draw:frame draw:style-name="fr1" draw:name="img9" text:anchor-type="as-char" svg:width="7.906cm" style:rel-width="85%" svg:height="11.779cm" draw:z-index="8"><draw:image xlink:href="Pictures/1000000000000310000004902EDE89A7.jpg" xlink:type="simple" xlink:show="embed" xlink:actuate="onLoad" draw:mime-type="image/jpeg"/></draw:frame></text:p>
      <text:p text:style-name="Text_20_body"><text:span text:style-name="Strong_20_Emphasis"><text:span text:style-name="T1">Tiempo dentro:</text:span></text:span><text:span text:style-name="T1"> Más de un mes.</text:span></text:p>
      <text:p text:style-name="Text_20_body"><text:span text:style-name="Strong_20_Emphasis"><text:span text:style-name="T1">Apariencia:</text:span></text:span><text:span text:style-name="T1"> mujer de unos 30 años, todavía intenta mantener una imagen cuidada, aunque su aspecto comienza a deteriorarse.</text:span></text:p>
      <text:p text:style-name="Text_20_body"><text:span text:style-name="Strong_20_Emphasis"><text:span text:style-name="T1">Personalidad:</text:span></text:span><text:span text:style-name="T1"> alegre de forma forzada, habla mucho y evita cualquier conversación sobre salir del resort. Ha empezado a convencerse de que este lugar es mejor que el mundo exterior.</text:span></text:p>
      <text:p text:style-name="Text_20_body"><text:span text:style-name="Strong_20_Emphasis"><text:span text:style-name="T1">Estado actual:</text:span></text:span><text:span text:style-name="T1"> está profundamente afectada por la simulación. Ya no quiere marcharse.</text:span></text:p>
      <text:p text:style-name="Text_20_body"><text:span text:style-name="Strong_20_Emphasis"><text:span text:style-name="T1">Información útil:</text:span></text:span><text:span text:style-name="T1"> puede dar información sobre cómo ha cambiado el resort con el tiempo y sobre otros huéspedes. Es un obstáculo en el reto de la </text:span><text:span text:style-name="Strong_20_Emphasis"><text:span text:style-name="T1">Llave de los Huéspedes</text:span></text:span><text:span text:style-name="T1">.</text:span></text:p>
      <text:p text:style-name="Text_20_body"><text:span text:style-name="Strong_20_Emphasis"><text:span text:style-name="T1">Frase característica:</text:span></text:span></text:p>
      <text:p text:style-name="P2">“¿Por qué querrías irte? Aquí tenemos atardeceres perfectos todos los días…”</text:p>
      <text:h text:style-name="P11" text:outline-level="3"><text:bookmark-start text:name="roldán"/>Roldán<text:bookmark-end text:name="roldán"/></text:h>
      <text:p text:style-name="First_20_paragraph"><text:span text:style-name="Strong_20_Emphasis"><text:span text:style-name="T1">Tipo:</text:span></text:span><text:span text:style-name="T1"> Técnico de mantenimiento</text:span></text:p>
      <text:p text:style-name="P6"><draw:frame draw:style-name="fr1" draw:name="img10" text:anchor-type="as-char" svg:width="7.906cm" style:rel-width="85%" svg:height="11.779cm" draw:z-index="9"><draw:image xlink:href="Pictures/10000000000003100000049079B6AF70.jpg" xlink:type="simple" xlink:show="embed" xlink:actuate="onLoad" draw:mime-type="image/jpeg"/></draw:frame></text:p>
      <text:p text:style-name="Text_20_body"><text:span text:style-name="Strong_20_Emphasis"><text:span text:style-name="T1">Tiempo dentro:</text:span></text:span><text:span text:style-name="T1"> unas dos semanas.</text:span></text:p>
      <text:p text:style-name="Text_20_body"><text:span text:style-name="Strong_20_Emphasis"><text:span text:style-name="T1">Apariencia:</text:span></text:span><text:span text:style-name="T1"> hombre de unos 45 años, aspecto sucio y agotado. Lleva mono de trabajo manchado y tiene herramientas improvisadas.</text:span></text:p>
      <text:p text:style-name="Text_20_body"><text:span text:style-name="Strong_20_Emphasis"><text:span text:style-name="T1">Personalidad:</text:span></text:span><text:span text:style-name="T1"> directo, gruñón y pragmático. Es el que mejor entiende el funcionamiento técnico del resort.</text:span></text:p>
      <text:p text:style-name="Text_20_body"><text:span text:style-name="Strong_20_Emphasis"><text:span text:style-name="T1">Estado actual:</text:span></text:span><text:span text:style-name="T1"> todavía quiere escapar y está intentando mantener algunos sistemas estables por su cuenta.</text:span></text:p>
      <text:p text:style-name="Text_20_body"><text:span text:style-name="Strong_20_Emphasis"><text:span text:style-name="T1">Información útil:</text:span></text:span><text:span text:style-name="T1"> es la mejor fuente de información técnica. Tiene (o puede conseguir) la </text:span><text:span text:style-name="Strong_20_Emphasis"><text:span text:style-name="T1">Llave del Técnico</text:span></text:span><text:span text:style-name="T1">. Es clave para el reto técnico.</text:span></text:p>
      <text:p text:style-name="Text_20_body"><text:span text:style-name="Strong_20_Emphasis"><text:span text:style-name="T1">Frase característica:</text:span></text:span></text:p>
      <text:p text:style-name="P2">“Esto no es un resort. Es una jaula con luces bonitas. Y yo ya estoy harto de las luces bonitas.”</text:p>
      <text:h text:style-name="P11" text:outline-level="3"><text:bookmark-start text:name="sol"/><text:soft-page-break/>Sol<text:bookmark-end text:name="sol"/></text:h>
      <text:p text:style-name="First_20_paragraph"><text:span text:style-name="Strong_20_Emphasis"><text:span text:style-name="T1">Tipo:</text:span></text:span><text:span text:style-name="T1"> Huéspeda joven (17 años).</text:span></text:p>
      <text:p text:style-name="P10"><draw:frame draw:style-name="fr1" draw:name="img11" text:anchor-type="as-char" svg:width="7.906cm" style:rel-width="85%" svg:height="11.77cm" draw:z-index="10"><draw:image xlink:href="Pictures/1000000000000310000004904CB319A5.jpg" xlink:type="simple" xlink:show="embed" xlink:actuate="onLoad" draw:mime-type="image/jpeg"/></draw:frame></text:p>
      <text:p text:style-name="Text_20_body"><text:span text:style-name="Strong_20_Emphasis"><text:span text:style-name="T1">Tiempo dentro:</text:span></text:span><text:span text:style-name="T1"> Solo unos días.</text:span></text:p>
      <text:p text:style-name="Text_20_body"><text:span text:style-name="Strong_20_Emphasis"><text:span text:style-name="T1">Apariencia:</text:span></text:span><text:span text:style-name="T1"> chica joven, aspecto asustado y desaliñado. Lleva ropa de resort que no le queda bien.</text:span></text:p>
      <text:p text:style-name="Text_20_body"><text:span text:style-name="Strong_20_Emphasis"><text:span text:style-name="T1">Personalidad:</text:span></text:span><text:span text:style-name="T1"> callada, observadora y nerviosa. Todavía tiene claro que quiere salir de aquí.</text:span></text:p>
      <text:p text:style-name="Text_20_body"><text:span text:style-name="Strong_20_Emphasis"><text:span text:style-name="T1">Estado actual:</text:span></text:span><text:span text:style-name="T1"> es una de las personas más recientes en llegar. Su familia ya no está con ella.</text:span></text:p>
      <text:p text:style-name="Text_20_body"><text:span text:style-name="Strong_20_Emphasis"><text:span text:style-name="T1">Información útil:</text:span></text:span><text:span text:style-name="T1"> puede dar una visión más “fresca” de lo que está pasando. Es una de las voces que más apoya escapar. Importante en el reto de la </text:span><text:span text:style-name="Strong_20_Emphasis"><text:span text:style-name="T1">Llave de los Huéspedes</text:span></text:span><text:span text:style-name="T1">.</text:span></text:p>
      <text:p text:style-name="Text_20_body"><text:span text:style-name="Strong_20_Emphasis"><text:span text:style-name="T1">Frase característica:</text:span></text:span></text:p>
      <text:p text:style-name="P2">“Mi madre dijo que solo serían unos días… ya no sé cuántos días han pas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fo:hyphenation-keep="auto" loext:hyphenation-keep-type="column" loext:hyphenation-keep-line="true" style:page-number="auto"/>
      <style:text-properties style:font-size-asian="11pt" fo:hyphenate="true" fo:hyphenation-remain-char-count="2" fo:hyphenation-push-char-count="2" loext:hyphenation-no-caps="false" loext:hyphenation-no-last-word="false" loext:hyphenation-word-char-count="4" loext:hyphenation-zone="no-limit" loext:hyphenation-compound-remain-char-count="2"/>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Linux_X86_64 LibreOffice_project/0229ac93fcf0d7cbc6376066c6f35021cef002dc</meta:generator>
    <dc:title/>
    <dc:description/>
    <dc:subject/>
    <meta:keyword/>
    <meta:initial-creator/>
    <meta:creation-date>2026-06-24T20:33:37Z</meta:creation-date>
    <dc:date>2026-06-24T22:41:53.890281328</dc:date>
    <meta:editing-duration>PT7M47S</meta:editing-duration>
    <meta:editing-cycles>1</meta:editing-cycles>
    <meta:document-statistic meta:table-count="0" meta:image-count="11" meta:object-count="0" meta:page-count="6" meta:paragraph-count="120" meta:word-count="1423" meta:character-count="8758" meta:non-whitespace-character-count="7457"/>
  </office:meta>
</office:document-meta>
</file>